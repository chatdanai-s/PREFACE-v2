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8da" officeooo:paragraph-rsid="0011a8da"/>
    </style:style>
    <style:style style:name="T1" style:family="text">
      <style:text-properties officeooo:rsid="00125a88"/>
    </style:style>
    <style:style style:name="T2" style:family="text">
      <style:text-properties officeooo:rsid="001311e6"/>
    </style:style>
    <style:style style:name="T3" style:family="text">
      <style:text-properties officeooo:rsid="0014b3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This file was produced by the NASA Exoplanet Archive <text:s/>http://exoplanetarchive.ipac.caltech.edu</text:p>
      <text:p text:style-name="P1"># Mon Sep <text:s/>2 07:35:11 2019</text:p>
      <text:p text:style-name="P1">#</text:p>
      <text:p text:style-name="P1"># COLUMN toi: <text:s text:c="11"/>TESS Object of Interest</text:p>
      <text:p text:style-name="P1"># COLUMN toipfx: <text:s text:c="8"/>TESS Object of Interest Prefix</text:p>
      <text:p text:style-name="P1"># COLUMN tid: <text:s text:c="11"/>TESS Input <text:span text:style-name="T1">Catalogue</text:span> ID</text:p>
      <text:p text:style-name="P1"># COLUMN ctoi_alias: <text:s text:c="4"/>Community TESS Object of Interest Alias</text:p>
      <text:p text:style-name="P1"># COLUMN pl_pnum: <text:s text:c="7"/>Number of Planets</text:p>
      <text:p text:style-name="P1"># COLUMN tfopwg_disp: <text:s text:c="3"/><text:span text:style-name="T2">TESS Follow-Up Observing Program Working Group (</text:span>TFOPWG<text:span text:style-name="T2">)</text:span> <text:span text:style-name="T1">Disposition</text:span> (<text:span text:style-name="T2">Confirmed Planet (</text:span>CP<text:span text:style-name="T2">)</text:span> | <text:span text:style-name="T2">False Positive (</text:span>FP<text:span text:style-name="T2">)</text:span> | <text:span text:style-name="T2">Known Planet (</text:span>KP<text:span text:style-name="T2">)</text:span> | <text:span text:style-name="T2">Planetary Candidate (</text:span>PC<text:span text:style-name="T2">)</text:span>)</text:p>
      <text:p text:style-name="P1"># COLUMN rastr: <text:s text:c="9"/>RA [sexagesimal]</text:p>
      <text:p text:style-name="P1"># COLUMN ra: <text:s text:c="12"/>RA [deg]</text:p>
      <text:p text:style-name="P1"># COLUMN raerr1: <text:s text:c="8"/>RA Upper Unc</text:p>
      <text:p text:style-name="P1"># COLUMN raerr2: <text:s text:c="8"/>RA Lower Unc</text:p>
      <text:p text:style-name="P1"># COLUMN decstr: <text:s text:c="8"/>Dec [sexagesimal]</text:p>
      <text:p text:style-name="P1"># COLUMN dec: <text:s text:c="11"/>Dec [deg]</text:p>
      <text:p text:style-name="P1"># COLUMN decerr1: <text:s text:c="7"/>Dec Upper Unc</text:p>
      <text:p text:style-name="P1"># COLUMN decerr2: <text:s text:c="7"/>Dec Lower Unc</text:p>
      <text:p text:style-name="P1"># COLUMN st_pmra: <text:s text:c="7"/><text:span text:style-name="T3">Proper Motion in Right Ascension (</text:span>PMRA<text:span text:style-name="T3">)</text:span> [mas/yr]</text:p>
      <text:p text:style-name="P1"># COLUMN st_pmraerr1: <text:s text:c="3"/>PMRA Upper Unc [mas/yr]</text:p>
      <text:p text:style-name="P1"># COLUMN st_pmraerr2: <text:s text:c="3"/>PMRA Lower Unc [mas/yr]</text:p>
      <text:p text:style-name="P1"># COLUMN st_pmralim: <text:s text:c="4"/>PMRA Limit Flag</text:p>
      <text:p text:style-name="P1"># COLUMN st_pmrasymerr: <text:s/>PMRA Symmetric Error Flag</text:p>
      <text:p text:style-name="P1"># COLUMN st_pmdec: <text:s text:c="6"/><text:span text:style-name="T3">Proper Motion in Declination (</text:span>PMDec<text:span text:style-name="T3">)</text:span> [mas/yr]</text:p>
      <text:p text:style-name="P1"># COLUMN st_pmdecerr1: <text:s text:c="2"/>PMDec Upper Unc [mas/yr]</text:p>
      <text:p text:style-name="P1"># COLUMN st_pmdecerr2: <text:s text:c="2"/>PMDec Lower Unc [mas/yr]</text:p>
      <text:p text:style-name="P1"># COLUMN st_pmdeclim: <text:s text:c="3"/>PMDec Limit Flag</text:p>
      <text:p text:style-name="P1"># COLUMN st_pmdecsymerr: PMDec Symmetric Error Flag</text:p>
      <text:p text:style-name="P1"># COLUMN pl_tranmid: <text:s text:c="4"/>Planet Transit Midpoint <text:span text:style-name="T3">Time</text:span> [BJD]</text:p>
      <text:p text:style-name="P1"># COLUMN pl_tranmiderr1: Planet Transit Midpoint Upper Unc [BJD]</text:p>
      <text:p text:style-name="P1"># COLUMN pl_tranmiderr2: Planit Transit Midpoint Lower Unc [BJD]</text:p>
      <text:p text:style-name="P1"># COLUMN pl_tranmidlim: <text:s/>Planet Transit Midpoint Limit Flag</text:p>
      <text:p text:style-name="P1"># COLUMN pl_tranmidsymerr: Planet Transit Midpoint Symmetric Error Flag</text:p>
      <text:p text:style-name="P1"># COLUMN pl_orbper: <text:s text:c="5"/>Planet Orbital Period Value [days]</text:p>
      <text:p text:style-name="P1"># COLUMN pl_orbpererr1: <text:s/>Planet Orbital Period Upper Unc [days]</text:p>
      <text:p text:style-name="P1"># COLUMN pl_orbpererr2: <text:s/>Planet Orbital Period Lower Unc [days]</text:p>
      <text:p text:style-name="P1"># COLUMN pl_orbperlim: <text:s text:c="2"/>Planet Orbital Period Limit Flag</text:p>
      <text:p text:style-name="P1"># COLUMN pl_orbpersymerr: Planet Orbital Period Symmetric Error Flag</text:p>
      <text:p text:style-name="P1"># COLUMN pl_trandurh: <text:s text:c="3"/>Planet Transit Duration <text:span text:style-name="T3">Time (T14)</text:span> [hours]</text:p>
      <text:p text:style-name="P1"># COLUMN pl_trandurherr1: Planet Transit Duration Upper Unc [hours]</text:p>
      <text:p text:style-name="P1"># COLUMN pl_trandurherr2: Planet Transit Duration Lower Unc [hours]</text:p>
      <text:p text:style-name="P1"># COLUMN pl_trandurhlim: Planet Transit Duration Limit Flag</text:p>
      <text:p text:style-name="P1"># COLUMN pl_trandurhsymerr: Planet Transit Duration Symmetric Error Flag</text:p>
      <text:p text:style-name="P1"># COLUMN pl_trandep: <text:s text:c="4"/>Planet Transit Depth Value [ppm]</text:p>
      <text:p text:style-name="P1"># COLUMN pl_trandeperr1: Planet Transit Depth Upper Unc [ppm]</text:p>
      <text:p text:style-name="P1"># COLUMN pl_trandeperr2: Planet Transit Depth Lower Unc [ppm]</text:p>
      <text:p text:style-name="P1"># COLUMN pl_trandeplim: <text:s/>Planet Transit Depth Limit Flag</text:p>
      <text:p text:style-name="P1"># COLUMN pl_trandepsymerr: Planet Transit Depth Symmetric Error Flag</text:p>
      <text:p text:style-name="P1"># COLUMN pl_rade: <text:s text:c="7"/>Planet Radius Value [R_Earth]</text:p>
      <text:p text:style-name="P1"># COLUMN pl_radeerr1: <text:s text:c="3"/>Planet Radius Upper Unc [R_Earth]</text:p>
      <text:p text:style-name="P1"># COLUMN pl_radeerr2: <text:s text:c="3"/>Planet Radius Lower Unc [R_Earth]</text:p>
      <text:p text:style-name="P1"><text:soft-page-break/># COLUMN pl_radelim: <text:s text:c="4"/>Planet Radius Limit Flag</text:p>
      <text:p text:style-name="P1"># COLUMN pl_radesymerr: <text:s/>Planet Radius Symmetric Error Flag</text:p>
      <text:p text:style-name="P1"># COLUMN pl_insol: <text:s text:c="6"/>Planet Insolation Value [Earth flux]</text:p>
      <text:p text:style-name="P1"># COLUMN pl_insolerr1: <text:s text:c="2"/>Planet Insolation Upper Unc [Earth flux]</text:p>
      <text:p text:style-name="P1"># COLUMN pl_insolerr2: <text:s text:c="2"/>Planet Insolation Lower Unc [Earth flux]</text:p>
      <text:p text:style-name="P1"># COLUMN pl_insollim: <text:s text:c="3"/>Planet Insolation Limit Flag</text:p>
      <text:p text:style-name="P1"># COLUMN pl_insolsymerr: Planet Insolation Symmetric Error Flag</text:p>
      <text:p text:style-name="P1"># COLUMN pl_eqt: <text:s text:c="8"/>Planet Equilibrium Temperature Value [K]</text:p>
      <text:p text:style-name="P1"># COLUMN pl_eqterr1: <text:s text:c="4"/>Planet Equilibrium Temperature Upper Unc [K]</text:p>
      <text:p text:style-name="P1"># COLUMN pl_eqterr2: <text:s text:c="4"/>Planet Equilibrium Temperature Lower Unc [K]</text:p>
      <text:p text:style-name="P1"># COLUMN pl_eqtlim: <text:s text:c="5"/>Planet Equilibrium Temperature Limit Flag</text:p>
      <text:p text:style-name="P1"># COLUMN pl_eqtsymerr: <text:s text:c="2"/>Planet Equilibrium Temperature Symmetric Error Flag</text:p>
      <text:p text:style-name="P1"># COLUMN st_tmag: <text:s text:c="7"/>TESS Magnitude</text:p>
      <text:p text:style-name="P1"># COLUMN st_tmagerr1: <text:s text:c="3"/>TESS Magnitude Upper Unc</text:p>
      <text:p text:style-name="P1"># COLUMN st_tmagerr2: <text:s text:c="3"/>TESS Magnitude Lower Unc</text:p>
      <text:p text:style-name="P1"># COLUMN st_tmaglim: <text:s text:c="4"/>TESS Magnitude Limit Flag</text:p>
      <text:p text:style-name="P1"># COLUMN st_tmagsymerr: <text:s/>TESS Magnitude Symmetric Error Flag</text:p>
      <text:p text:style-name="P1"># COLUMN st_dist: <text:s text:c="7"/>Stellar Distance [pc]</text:p>
      <text:p text:style-name="P1"># COLUMN st_disterr1: <text:s text:c="3"/>Stellar Distance Upper Unc [pc]</text:p>
      <text:p text:style-name="P1"># COLUMN st_disterr2: <text:s text:c="3"/>Stellar Distance Lower Unc [pc]</text:p>
      <text:p text:style-name="P1"># COLUMN st_distlim: <text:s text:c="4"/>Stellar Distance Limit Flag</text:p>
      <text:p text:style-name="P1"># COLUMN st_distsymerr: <text:s/>Stellar Distance Symmetric Error Flag</text:p>
      <text:p text:style-name="P1"># COLUMN st_teff: <text:s text:c="7"/>Stellar Effective Temperature Value [K]</text:p>
      <text:p text:style-name="P1"># COLUMN st_tefferr1: <text:s text:c="3"/>Stellar Effective <text:span text:style-name="T1">Temperature</text:span> Upper Unc [K]</text:p>
      <text:p text:style-name="P1"># COLUMN st_tefferr2: <text:s text:c="3"/>Stellar <text:span text:style-name="T1">Effective</text:span> Temperature Lower Unc [K]</text:p>
      <text:p text:style-name="P1"># COLUMN st_tefflim: <text:s text:c="4"/>Stellar Effective Temperature Limit Flag</text:p>
      <text:p text:style-name="P1"># COLUMN st_teffsymerr: <text:s/>Stellar Effective Temperature S<text:span text:style-name="T1">y</text:span>mmetric Error Flag</text:p>
      <text:p text:style-name="P1"># COLUMN st_logg: <text:s text:c="7"/>Stellar log(g) Value [cm/s**2]</text:p>
      <text:p text:style-name="P1"># COLUMN st_loggerr1: <text:s text:c="3"/>Stellar log(g) Upper Unc [cm/s**]</text:p>
      <text:p text:style-name="P1"># COLUMN st_loggerr2: <text:s text:c="3"/>Stellar log(g) Lower Unc [cm/s**2]</text:p>
      <text:p text:style-name="P1"># COLUMN st_logglim: <text:s text:c="4"/>Stellar log(g) Limit Flag</text:p>
      <text:p text:style-name="P1"># COLUMN st_loggsymerr: <text:s/>Stellar log(g) Symmetric Error Flag</text:p>
      <text:p text:style-name="P1"># COLUMN st_rad: <text:s text:c="8"/>Stellar Radius Value [R_Sun]</text:p>
      <text:p text:style-name="P1"># COLUMN st_raderr1: <text:s text:c="4"/>Stellar Radius Upper Unc [R_Sun]</text:p>
      <text:p text:style-name="P1"># COLUMN st_raderr2: <text:s text:c="4"/>Stellar Radius Lower Unc [R_Sun]</text:p>
      <text:p text:style-name="P1"># COLUMN st_radlim: <text:s text:c="5"/>Stellar Radius Limit Flag</text:p>
      <text:p text:style-name="P1"># COLUMN st_radsymerr: <text:s text:c="2"/>Stellar Radius Symmetric Error Flag</text:p>
      <text:p text:style-name="P1"># COLUMN toi_created: <text:s text:c="3"/>TOI Created Date</text:p>
      <text:p text:style-name="P1"># COLUMN rowupdate: <text:s text:c="5"/>Date Modified</text:p>
      <text:p text:style-name="P1"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38:27.278000000</meta:creation-date>
    <dc:date>2019-09-03T11:13:43.533968836</dc:date>
    <meta:editing-duration>PT32M33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2" meta:paragraph-count="90" meta:word-count="695" meta:character-count="5074" meta:non-whitespace-character-count="4143"/>
  </office:meta>
</office:document-meta>
</file>